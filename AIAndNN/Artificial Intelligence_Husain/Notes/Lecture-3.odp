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300000141B619DED4.png" manifest:media-type="image/png"/>
  <manifest:file-entry manifest:full-path="Pictures/10000001000003640000024AAF1AB23A.png" manifest:media-type="image/png"/>
  <manifest:file-entry manifest:full-path="Pictures/1000000100000445000002B39B21A2A8.png" manifest:media-type="image/png"/>
  <manifest:file-entry manifest:full-path="Pictures/10000001000004A2000002CDAEA870D5.png" manifest:media-type="image/png"/>
  <manifest:file-entry manifest:full-path="Pictures/10000001000004150000021C58E454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73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277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 fo:font-size="20pt" style:text-underline-style="none" fo:font-weight="bold" style:font-size-asian="20pt" style:font-weight-asian="bold" style:font-size-complex="20pt" style:font-weight-complex="bold"/>
    </style:style>
    <style:style style:name="T7" style:family="text">
      <style:text-properties style:text-position="0% 100%"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style:text-position="super 58%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style:text-position="super 58%" fo:font-size="20pt" style:text-underline-style="none" style:font-size-asian="20pt" style:font-size-complex="20pt"/>
    </style:style>
    <style:style style:name="T11" style:family="text">
      <style:text-properties style:text-position="0% 100%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lving problems by search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hapter-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2">Initial state</text:span></text:p>
                  </text:list-item>
                  <text:list-item>
                    <text:p><text:span text:style-name="T2">Actions available</text:span></text:p>
                  </text:list-item>
                  <text:list-item>
                    <text:p><text:span text:style-name="T2">Transition model (What each action does)</text:span></text:p>
                  </text:list-item>
                  <text:list-item>
                    <text:p><text:span text:style-name="T2">Goal test</text:span></text:p>
                  </text:list-item>
                  <text:list-item>
                    <text:p><text:span text:style-name="T2">Path cost</text:span></text:p>
                  </text:list-item>
                </text:list>
              </text:list-item>
              <text:list-item>
                <text:p><text:span text:style-name="T2">Different search solutions can solve these problems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Restricted form of general agent</text:span></text:p>
              </text:list-item>
            </text:list>
          </draw:text-box>
        </draw:frame>
        <draw:frame draw:style-name="gr2" draw:text-style-name="P4" draw:layer="layout" svg:width="21.775cm" svg:height="11.252cm" svg:x="1.25cm" svg:y="3.71cm">
          <draw:image xlink:href="Pictures/10000001000004150000021C58E454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Example Romania</text:span></text:p>
          </draw:text-box>
        </draw:frame>
        <draw:frame draw:style-name="gr2" draw:text-style-name="P4" draw:layer="layout" svg:width="21.922cm" svg:height="13.253cm" svg:x="2.548cm" svg:y="2.24cm">
          <draw:image xlink:href="Pictures/10000001000004A2000002CDAEA870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Example Romania</text:span></text:p>
          </draw:text-box>
        </draw:frame>
        <draw:frame presentation:style-name="pr5" draw:layer="layout" svg:width="25.199cm" svg:height="13.055cm" svg:x="1.2cm" svg:y="2.185cm" presentation:class="outline" presentation:user-transformed="true">
          <draw:text-box>
            <text:list text:style-name="L2">
              <text:list-item>
                <text:p><text:span text:style-name="T2">On a holiday in Romania: currently in Arad. </text:span></text:p>
              </text:list-item>
              <text:list-item>
                <text:p><text:span text:style-name="T2">Flight leaves tomorrow from Bucharest</text:span></text:p>
              </text:list-item>
              <text:list-item>
                <text:p><text:span text:style-name="T2">Formulate goal:</text:span></text:p>
                <text:list>
                  <text:list-item>
                    <text:p><text:span text:style-name="T2">Be in Bucharest</text:span></text:p>
                  </text:list-item>
                </text:list>
              </text:list-item>
              <text:list-item>
                <text:p><text:span text:style-name="T2">Formulate problem: </text:span></text:p>
                <text:list>
                  <text:list-item>
                    <text:p><text:span text:style-name="T2">States: various cities</text:span></text:p>
                  </text:list-item>
                  <text:list-item>
                    <text:p><text:span text:style-name="T2">Actions: Drive between cities</text:span></text:p>
                  </text:list-item>
                </text:list>
              </text:list-item>
              <text:list-item>
                <text:p><text:span text:style-name="T2">Find solution:</text:span></text:p>
                <text:list>
                  <text:list-item>
                    <text:p><text:span text:style-name="T2">Sequence of cities e.g. Arad, Sibiu, Fagaras, Bucharest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Example Romania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3">Initial state:</text:span><text:span text:style-name="T2"> In (Arad)</text:span></text:p>
                  </text:list-item>
                  <text:list-item>
                    <text:p><text:span text:style-name="T3">Actions available:</text:span><text:span text:style-name="T2"> Go (Sibiu), Go (Timisoara), Go (Zerind)</text:span></text:p>
                  </text:list-item>
                  <text:list-item>
                    <text:p><text:span text:style-name="T3">Transition model:</text:span><text:span text:style-name="T2"> RESULT (In(Arad ), Go(Zerind )) = In(Zerind )</text:span></text:p>
                  </text:list-item>
                  <text:list-item>
                    <text:p><text:span text:style-name="T3">Goal test: </text:span><text:span text:style-name="T2">{In(Bucharest )}</text:span></text:p>
                  </text:list-item>
                  <text:list-item>
                    <text:p><text:span text:style-name="T3">Path cost:</text:span><text:span text:style-name="T4"> c(s, a, s’). Action a, taken in state s, to reach to s’, has cost c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Vacuum World</text:span></text:p>
          </draw:text-box>
        </draw:frame>
        <draw:frame draw:style-name="gr2" draw:text-style-name="P4" draw:layer="layout" svg:width="20.955cm" svg:height="13.248cm" svg:x="3.61cm" svg:y="2.105cm">
          <draw:image xlink:href="Pictures/1000000100000445000002B39B21A2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Vacuum World</text:span></text:p>
          </draw:text-box>
        </draw:frame>
        <draw:frame presentation:style-name="pr5" draw:layer="layout" svg:width="25.199cm" svg:height="10.355cm" svg:x="1.201cm" svg:y="2.186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3">States:</text:span><text:span text:style-name="T5"> 2 x 2</text:span><text:span text:style-name="T6">2 </text:span><text:span text:style-name="T7">= 8 possible states</text:span></text:p>
                  </text:list-item>
                  <text:list-item>
                    <text:p><text:span text:style-name="T3">Initial state:</text:span><text:span text:style-name="T2"> Any state can be start state. </text:span></text:p>
                  </text:list-item>
                  <text:list-item>
                    <text:p><text:span text:style-name="T3">Actions available:</text:span><text:span text:style-name="T2"> Left, Right, Suck</text:span></text:p>
                  </text:list-item>
                  <text:list-item>
                    <text:p><text:span text:style-name="T3">Transition model:</text:span><text:span text:style-name="T2"> Complete state space shown in previous slide</text:span></text:p>
                  </text:list-item>
                  <text:list-item>
                    <text:p><text:span text:style-name="T3">Goal test:</text:span><text:span text:style-name="T4"> If all squares are clean</text:span></text:p>
                  </text:list-item>
                  <text:list-item>
                    <text:p><text:span text:style-name="T3">Path cost:</text:span><text:span text:style-name="T4"> Each step cost 1.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8 puzzle problem</text:span></text:p>
          </draw:text-box>
        </draw:frame>
        <draw:frame draw:style-name="gr2" draw:text-style-name="P4" draw:layer="layout" svg:width="18.282cm" svg:height="8.492cm" svg:x="4.933cm" svg:y="3.673cm">
          <draw:image xlink:href="Pictures/10000001000002B300000141B619DED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8-puzzle problem</text:span></text:p>
          </draw:text-box>
        </draw:frame>
        <draw:frame presentation:style-name="pr5" draw:layer="layout" svg:width="25.199cm" svg:height="13.689cm" svg:x="1.201cm" svg:y="2.186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3">States:</text:span><text:span text:style-name="T5"> </text:span><text:span text:style-name="T8">Location of each of the eight tiles, the blank is one of the 9</text:span><text:span text:style-name="T9">th</text:span><text:span text:style-name="T8"> tile</text:span></text:p>
                  </text:list-item>
                  <text:list-item>
                    <text:p><text:span text:style-name="T3">Initial state:</text:span><text:span text:style-name="T2"> Any state can be start state. </text:span></text:p>
                  </text:list-item>
                  <text:list-item>
                    <text:p><text:span text:style-name="T3">Actions available:</text:span><text:span text:style-name="T2"> Movement of blank space Left, Right, Up, Down</text:span></text:p>
                  </text:list-item>
                  <text:list-item>
                    <text:p><text:span text:style-name="T3">Transition model:</text:span><text:span text:style-name="T2"> Complete state space shown in previous slide</text:span></text:p>
                  </text:list-item>
                  <text:list-item>
                    <text:p><text:span text:style-name="T3">Goal test:</text:span><text:span text:style-name="T4"> Goal configuration achieved or not? Can have different goals</text:span></text:p>
                  </text:list-item>
                  <text:list-item>
                    <text:p><text:span text:style-name="T3">Path cost:</text:span><text:span text:style-name="T4"> Each step cost 1. </text:span></text:p>
                  </text:list-item>
                </text:list>
              </text:list-item>
              <text:list-item>
                <text:p><text:span text:style-name="T4">Belongs to sliding block puzzle problem. NP-Complete problem. </text:span></text:p>
              </text:list-item>
              <text:list-item>
                <text:p><text:span text:style-name="T4">8-puzzle has 9!/2=181,440 reachable states</text:span></text:p>
              </text:list-item>
              <text:list-item>
                <text:p><text:span text:style-name="T4">15-puzzle (4x4) has 1.3 trillion states. Best search can solve in milli-seconds</text:span></text:p>
              </text:list-item>
              <text:list-item>
                <text:p><text:span text:style-name="T4">24-puzzle (5x5) has 10</text:span><text:span text:style-name="T10">25</text:span><text:span text:style-name="T4"> states. It takes several hours to solve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8 queens problem</text:span></text:p>
          </draw:text-box>
        </draw:frame>
        <draw:frame draw:style-name="gr3" draw:text-style-name="P4" draw:layer="layout" svg:width="17.78cm" svg:height="12.398cm" svg:x="5.715cm" svg:y="3.175cm">
          <draw:image xlink:href="Pictures/10000001000003640000024AAF1AB23A.png" xlink:type="simple" xlink:show="embed" xlink:actuate="onLoad" draw:mime-type="image/png">
            <text:p/>
          </draw:image>
        </draw:frame>
        <draw:frame presentation:style-name="pr5" draw:layer="layout" svg:width="25.199cm" svg:height="13.689cm" svg:x="1.202cm" svg:y="2.187cm" presentation:class="outline" presentation:user-transformed="true">
          <draw:text-box>
            <text:list text:style-name="L2">
              <text:list-item>
                <text:p><text:span text:style-name="T2">Place eight queens on chessboard so that no queen attack any othe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 8 queen problem</text:span></text:p>
          </draw:text-box>
        </draw:frame>
        <draw:frame presentation:style-name="pr5" draw:layer="layout" svg:width="25.199cm" svg:height="13.689cm" svg:x="1.201cm" svg:y="2.186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3">States:</text:span><text:span text:style-name="T5"> </text:span><text:span text:style-name="T8">Any arrangement of 0 to 8 queens on the board is a state.</text:span></text:p>
                  </text:list-item>
                  <text:list-item>
                    <text:p><text:span text:style-name="T3">Initial state:</text:span><text:span text:style-name="T2"> No queens on the board. </text:span></text:p>
                  </text:list-item>
                  <text:list-item>
                    <text:p><text:span text:style-name="T3">Actions available:</text:span><text:span text:style-name="T2"> Add a queen to an empty square. </text:span></text:p>
                  </text:list-item>
                  <text:list-item>
                    <text:p><text:span text:style-name="T3">Transition model:</text:span><text:span text:style-name="T2"> Returns the board with a queen added.</text:span></text:p>
                  </text:list-item>
                  <text:list-item>
                    <text:p><text:span text:style-name="T3">Goal test:</text:span><text:span text:style-name="T4"> 8 queens are on the board, none attacked. </text:span></text:p>
                  </text:list-item>
                </text:list>
              </text:list-item>
              <text:list-item>
                <text:p><text:span text:style-name="T4">We have 64x63… 57 = 1.8 x 10</text:span><text:span text:style-name="T10">14</text:span><text:span text:style-name="T11"> possible sequences to investigate. </text:span></text:p>
              </text:list-item>
              <text:list-item>
                <text:p><text:span text:style-name="T11">Another solution</text:span></text:p>
                <text:list>
                  <text:list-item>
                    <text:p><text:span text:style-name="T11">States: Any arrangement in which queens are placed one per column.</text:span></text:p>
                  </text:list-item>
                  <text:list-item>
                    <text:p><text:span text:style-name="T11">Actions: Add a queen to any square in the leftmost empty column such that it is not attacked. Hence the state space is reduced to 2057 possibilites.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 –Real world problems</text:span></text:p>
          </draw:text-box>
        </draw:frame>
        <draw:frame presentation:style-name="pr5" draw:layer="layout" svg:width="25.199cm" svg:height="13.689cm" svg:x="1.201cm" svg:y="2.186cm" presentation:class="outline" presentation:user-transformed="true">
          <draw:text-box>
            <text:list text:style-name="L2">
              <text:list-item>
                <text:p><text:span text:style-name="T2">Route finding problem</text:span></text:p>
                <text:list>
                  <text:list-item>
                    <text:p><text:span text:style-name="T11">Touring problem: Each city is visited.</text:span></text:p>
                  </text:list-item>
                  <text:list-item>
                    <text:p><text:span text:style-name="T11">TSP: Each city is visited once. </text:span></text:p>
                  </text:list-item>
                  <text:list-item>
                    <text:p><text:span text:style-name="T11">VLSI Layout: Cell layout, channel routing. </text:span></text:p>
                  </text:list-item>
                  <text:list-item>
                    <text:p><text:span text:style-name="T11">Robot Navigation: Continuous space routing problem.</text:span></text:p>
                  </text:list-item>
                  <text:list-item>
                    <text:p><text:span text:style-name="T11">Automatic assembly sequencing: Sequence of steps to be followed.</text:span></text:p>
                  </text:list-item>
                  <text:list-item>
                    <text:p><text:span text:style-name="T11">Protein Design: Design sequence of amino acids. To fold into 3D protei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31:54.820685978</meta:creation-date>
    <meta:generator>LibreOffice/24.8.5.2$Linux_X86_64 LibreOffice_project/27b361b745d0ea8f99bc93dfcb7a39098dfa5fff</meta:generator>
    <dc:date>2025-03-16T23:57:05.405589091</dc:date>
    <meta:editing-duration>PT13H14M42S</meta:editing-duration>
    <meta:editing-cycles>52</meta:editing-cycles>
    <meta:document-statistic meta:object-count="75"/>
  </office:meta>
</office:document-meta>
</file>